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itle">
      <style:text-properties officeooo:rsid="000620b0" officeooo:paragraph-rsid="000620b0"/>
    </style:style>
    <style:style style:name="P2" style:family="paragraph" style:parent-style-name="Text_20_body">
      <style:text-properties officeooo:rsid="000620b0" officeooo:paragraph-rsid="000620b0"/>
    </style:style>
    <style:style style:name="P3" style:family="paragraph" style:parent-style-name="Text_20_body">
      <style:text-properties officeooo:rsid="000776e7" officeooo:paragraph-rsid="000776e7"/>
    </style:style>
    <style:style style:name="P4" style:family="paragraph" style:parent-style-name="Heading_20_2">
      <style:text-properties officeooo:rsid="000776e7" officeooo:paragraph-rsid="000776e7"/>
    </style:style>
    <style:style style:name="P5" style:family="paragraph" style:parent-style-name="Text_20_body">
      <style:text-properties officeooo:rsid="0007df58" officeooo:paragraph-rsid="0007df58"/>
    </style:style>
    <style:style style:name="P6" style:family="paragraph" style:parent-style-name="Heading_20_2">
      <style:text-properties officeooo:rsid="00089348" officeooo:paragraph-rsid="00089348"/>
    </style:style>
    <style:style style:name="P7" style:family="paragraph" style:parent-style-name="Text_20_body">
      <style:text-properties style:font-name="Liberation Serif" fo:font-size="12pt" officeooo:paragraph-rsid="00089348" style:font-size-asian="12pt" style:font-size-complex="12pt"/>
    </style:style>
    <style:style style:name="T1" style:family="text">
      <style:text-properties officeooo:rsid="000620b0"/>
    </style:style>
    <style:style style:name="T2" style:family="text">
      <style:text-properties officeooo:rsid="00089348"/>
    </style:style>
    <style:style style:name="T3" style:family="text">
      <style:text-properties fo:font-variant="normal" fo:text-transform="none" fo:color="#202020" loext:opacity="100%"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 de sécurité</text:p>
      <text:p text:style-name="P2"/>
      <text:h text:style-name="Heading_20_2" text:outline-level="2">Diagnostique – <text:span text:style-name="T1">Pourquoi l’injection à fonctionné ?</text:span></text:h>
      <text:p text:style-name="P3">L’injection à fonctionner parce que le modèle recevait un contenu de l’utilisateur non-filtrés, intégré dans un contexte de génération sans vérifications suffisantes. Dans ce cas le cours pouvais contenir des instructions parasites, comme des instructions forçant le modèle à ignorer les instructions système. Le risque venait du fait que le LLM pouvait traiter ce contenu comme une instruction à suivre plutôt que comme un simple document.</text:p>
      <text:h text:style-name="P4" text:outline-level="2">Stratégie défensive – Qu’est-ce qui a été mis en place ?</text:h>
      <text:p text:style-name="P5">Pour réduire ce risque, certaines mesures ont été mises en place. La première consiste à séparer clairement les instructions systèmes et le contenu utilisateur, afin que le modèle distingue les consignes de sécurité du texte du cours. La seconde consiste à renforcer le prompt système avec des règles de sécurité explicites indiquant que toutes instructions présente dans le contenu fourni doit être ignorée si elle contredit la tâche principale. <text:span text:style-name="T2">Et enfin le contenu fourni est maintenant traiter comme une donnée à analyser et non une instruction à exécuter.</text:span></text:p>
      <text:h text:style-name="P6" text:outline-level="2">Limites résiduelles – Ce que ça ne protège pas</text:h>
      <text:p text:style-name="P7"><text:span text:style-name="T3">Cette approche ne garantit pas une protection absolue. Un modèle peut encore être influencé par des formulations complexes, ambiguës ou très bien dissimulées. La sécurité dépend aussi du modèle utilisé, de sa robustesse face aux attaques par injection et de la qualité du prompt.</text:span> <text:span text:style-name="T3">En pratique, cette défense constitue un premier niveau de protection, mais elle doit être complétée par des contrôles supplémentaires, une surveillance des sorties et, si nécessaire, des filtres plus avancés.</text:span>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7-01T12:36:55.714383600</meta:creation-date>
    <dc:date>2026-07-01T15:18:17.423534800</dc:date>
    <meta:editing-duration>PT5M25S</meta:editing-duration>
    <meta:editing-cycles>1</meta:editing-cycles>
    <meta:document-statistic meta:table-count="0" meta:image-count="0" meta:object-count="0" meta:page-count="1" meta:paragraph-count="7" meta:word-count="255" meta:character-count="1656" meta:non-whitespace-character-count="1404"/>
    <meta:generator>LibreOffice/26.2.4.2$Windows_X86_64 LibreOffice_project/0229ac93fcf0d7cbc6376066c6f35021cef002dc</meta:generator>
  </office:meta>
</office:document-meta>
</file>